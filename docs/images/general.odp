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B4E349B9.png" manifest:media-type="image/png"/>
  <manifest:file-entry manifest:full-path="Pictures/100025C2000052220000741E3219F4A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5cm" fo:min-width="16cm" loext:decorative="false"/>
    </style:style>
    <style:style style:name="gr4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Puntas_20_de_20_flecha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Puntas_20_de_20_flecha_20_4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0.76cm" fo:min-width="3.2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2a6099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528cm" fo:min-width="2.046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755cm" fo:min-width="2.046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04cm" fo:min-width="3.32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668cm" fo:min-width="2.046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93cm" fo:min-width="3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532cm" fo:min-width="2.18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532cm" fo:min-width="1.62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0.5cm" fo:min-width="1.851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532cm" fo:min-width="2.33cm" style:writing-mode="lr-tb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aa95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2a6099"/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="solid" draw:fill-color="#e8f2a1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eeeeee"/>
      <style:paragraph-properties fo:text-align="center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solid" draw:fill-color="#e8f2a1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6.549cm" svg:height="15.749cm" svg:x="8.451cm" svg:y="0.008cm">
          <draw:image xlink:href="Pictures/100025C2000052220000741E3219F4A9.svg" xlink:type="simple" xlink:show="embed" xlink:actuate="onLoad" draw:mime-type="image/svg+xml">
            <text:p/>
          </draw:image>
          <draw:image xlink:href="Pictures/100000010000025300000349B4E349B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3" draw:text-style-name="P3" draw:layer="layout" svg:width="16.5cm" svg:height="7.75cm" svg:x="10.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75cm" svg:height="1.25cm" svg:x="1.75cm" svg:y="7.775cm">
          <text:p text:style-name="P1"><text:span text:style-name="T1">Hiperparámetro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cm" svg:height="1.5cm" svg:x="7.05cm" svg:y="7.65cm">
          <text:p text:style-name="P1"><text:span text:style-name="T1">Redes</text:span><text:span text:style-name="T1"><text:line-break/></text:span><text:span text:style-name="T1">neuronale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.5cm" svg:y1="8.4cm" svg:x2="7.05cm" svg:y2="8.4cm" draw:start-shape="id1" draw:start-glue-point="1" draw:end-shape="id2" draw:end-glue-point="3" svg:d="M5500 8400h1550" svg:viewBox="0 0 1551 1">
          <text:p/>
        </draw:connector>
        <draw:custom-shape draw:style-name="gr7" draw:text-style-name="P7" xml:id="id10" draw:id="id10" draw:layer="layout" svg:width="3cm" svg:height="1.75cm" svg:x="11.5cm" svg:y="7.5cm">
          <text:p text:style-name="P6"><text:span text:style-name="T1">Epo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3cm" svg:height="1.75cm" svg:x="14.95cm" svg:y="4.4cm">
          <text:p text:style-name="P6"><text:span text:style-name="T1">Episodio/</text:span><text:span text:style-name="T1"><text:line-break/></text:span><text:span text:style-name="T1">Bat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2.5cm" svg:height="0.75cm" svg:x="19.7cm" svg:y="4cm">
          <text:p text:style-name="P8"><text:span text:style-name="T2">Rando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2.5cm" svg:height="0.75cm" svg:x="19.7cm" svg:y="4.9cm">
          <text:p text:style-name="P8"><text:span text:style-name="T2">MaxDamag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2.5cm" svg:height="0.75cm" svg:x="19.7cm" svg:y="5.8cm">
          <text:p text:style-name="P8"><text:span text:style-name="T2">selfPlay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95cm" svg:y1="5.275cm" svg:x2="19.7cm" svg:y2="4.375cm" draw:start-shape="id3" draw:start-glue-point="10" draw:end-shape="id4" draw:end-glue-point="3" svg:d="M17950 5275l1750-900" svg:viewBox="0 0 1751 901">
          <text:p/>
        </draw:connector>
        <draw:connector draw:style-name="gr6" draw:text-style-name="P5" draw:layer="layout" draw:type="line" svg:x1="17.95cm" svg:y1="5.275cm" svg:x2="19.7cm" svg:y2="5.275cm" draw:start-shape="id3" draw:start-glue-point="10" draw:end-shape="id5" draw:end-glue-point="3" svg:d="M17950 5275h1750" svg:viewBox="0 0 1751 1">
          <text:p/>
        </draw:connector>
        <draw:connector draw:style-name="gr6" draw:text-style-name="P5" draw:layer="layout" draw:type="line" svg:x1="17.95cm" svg:y1="5.275cm" svg:x2="19.7cm" svg:y2="6.175cm" draw:start-shape="id3" draw:start-glue-point="10" draw:end-shape="id6" draw:end-glue-point="3" svg:d="M17950 5275l1750 900" svg:viewBox="0 0 1751 901">
          <text:p/>
        </draw:connector>
        <draw:connector draw:style-name="gr6" draw:text-style-name="P5" xml:id="id7" draw:id="id7" draw:layer="layout" draw:type="line" svg:x1="22.2cm" svg:y1="5.275cm" svg:x2="23.616cm" svg:y2="5.238cm" draw:start-shape="id5" draw:start-glue-point="1" svg:d="M22200 5275l1416-37" svg:viewBox="0 0 1417 38">
          <text:p/>
        </draw:connector>
        <draw:connector draw:style-name="gr6" draw:text-style-name="P5" draw:layer="layout" draw:type="line" svg:x1="22.2cm" svg:y1="4.375cm" svg:x2="23.616cm" svg:y2="5.238cm" draw:start-shape="id4" draw:start-glue-point="1" draw:end-shape="id7" draw:end-glue-point="3" svg:d="M22200 4375l1416 863" svg:viewBox="0 0 1417 864">
          <text:p/>
        </draw:connector>
        <draw:connector draw:style-name="gr6" draw:text-style-name="P5" draw:layer="layout" draw:type="line" svg:x1="22.2cm" svg:y1="6.175cm" svg:x2="23.616cm" svg:y2="5.238cm" draw:start-shape="id6" draw:start-glue-point="1" draw:end-shape="id7" draw:end-glue-point="3" svg:d="M22200 6175l1416-937" svg:viewBox="0 0 1417 938">
          <text:p/>
        </draw:connector>
        <draw:connector draw:style-name="gr9" draw:text-style-name="P5" draw:layer="layout" draw:type="line" svg:x1="23.616cm" svg:y1="5.238cm" svg:x2="25.416cm" svg:y2="5.239cm" draw:start-shape="id7" draw:start-glue-point="3" svg:d="M23616 5238l1800 1" svg:viewBox="0 0 1801 2">
          <text:p/>
        </draw:connector>
        <draw:connector draw:style-name="gr9" draw:text-style-name="P5" xml:id="id8" draw:id="id8" draw:layer="layout" draw:type="line" svg:x1="25.439cm" svg:y1="7.419cm" svg:x2="25.416cm" svg:y2="5.24cm" svg:d="M25439 7419l-23-2179" svg:viewBox="0 0 24 2180">
          <text:p/>
        </draw:connector>
        <draw:connector draw:style-name="gr10" draw:text-style-name="P5" draw:layer="layout" draw:line-skew="-0.437cm" svg:x1="25.439cm" svg:y1="7.419cm" svg:x2="16.45cm" svg:y2="6.15cm" draw:start-shape="id8" draw:start-glue-point="2" draw:end-shape="id3" draw:end-glue-point="8" svg:d="M25439 7419v81h-8989v-1350" svg:viewBox="0 0 8990 1351">
          <text:p/>
        </draw:connector>
        <draw:connector draw:style-name="gr9" draw:text-style-name="P5" xml:id="id9" draw:id="id9" draw:layer="layout" draw:type="line" svg:x1="25.439cm" svg:y1="7.419cm" svg:x2="25.439cm" svg:y2="9.332cm" draw:start-shape="id8" draw:start-glue-point="2" svg:d="M25439 7419v1913" svg:viewBox="0 0 1 1914">
          <text:p/>
        </draw:connector>
        <draw:connector draw:style-name="gr10" draw:text-style-name="P5" draw:layer="layout" draw:line-skew="0.15cm" svg:x1="25.439cm" svg:y1="9.332cm" svg:x2="13cm" svg:y2="9.25cm" draw:start-shape="id9" draw:start-glue-point="3" draw:end-shape="id10" draw:end-glue-point="8" svg:d="M25439 9332v668h-12439v-750" svg:viewBox="0 0 12440 751">
          <text:p/>
        </draw:connector>
        <draw:connector draw:style-name="gr10" draw:text-style-name="P5" draw:layer="layout" svg:x1="13cm" svg:y1="7.5cm" svg:x2="14.95cm" svg:y2="5.275cm" draw:start-shape="id10" draw:start-glue-point="4" draw:end-shape="id3" draw:end-glue-point="6" svg:d="M13000 7500v-2225h1950" svg:viewBox="0 0 1951 2226">
          <text:p/>
        </draw:connector>
        <draw:connector draw:style-name="gr6" draw:text-style-name="P5" draw:layer="layout" draw:type="line" svg:x1="10.05cm" svg:y1="8.4cm" svg:x2="11.5cm" svg:y2="8.375cm" draw:start-shape="id2" draw:start-glue-point="1" draw:end-shape="id10" draw:end-glue-point="6" svg:d="M10050 8400l1450-25" svg:viewBox="0 0 1451 26">
          <text:p/>
        </draw:connector>
        <draw:frame draw:style-name="gr11" draw:text-style-name="P10" draw:layer="layout" svg:width="7.5cm" svg:height="0.75cm" svg:x="15.807cm" svg:y="9.408cm">
          <draw:text-box>
            <text:p><text:span text:style-name="T3">calculateRewards / retropropagación</text:span></text:p>
          </draw:text-box>
        </draw:frame>
        <draw:frame draw:style-name="gr11" draw:text-style-name="P12" draw:layer="layout" svg:width="3.65cm" svg:height="0.75cm" svg:x="23.5cm" svg:y="10.3cm">
          <draw:text-box>
            <text:p text:style-name="P11"><text:span text:style-name="T4">Entrenamien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onnector draw:style-name="gr6" draw:text-style-name="P5" draw:layer="layout" draw:type="line" svg:x1="22.54cm" svg:y1="9.03cm" svg:x2="22.54cm" svg:y2="6.604cm" draw:start-shape="id11" draw:start-glue-point="4" draw:end-shape="id12" draw:end-glue-point="8" svg:d="M22540 9030v-2426" svg:viewBox="0 0 1 2427">
          <text:p/>
        </draw:connector>
        <draw:connector draw:style-name="gr6" draw:text-style-name="P5" draw:layer="layout" draw:type="line" svg:x1="15cm" svg:y1="9.678cm" svg:x2="20.74cm" svg:y2="9.678cm" draw:start-shape="id13" draw:start-glue-point="10" draw:end-shape="id11" draw:end-glue-point="6" svg:d="M15000 9678h5740" svg:viewBox="0 0 5741 1">
          <text:p/>
        </draw:connector>
        <draw:custom-shape draw:style-name="gr12" draw:text-style-name="P4" draw:layer="layout" svg:width="3.75cm" svg:height="1.01cm" svg:x="1.75cm" svg:y="7.485cm">
          <text:p text:style-name="P1"><text:span text:style-name="T1">Hiperparámetro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5.5cm" svg:y1="8cm" svg:x2="10.673cm" svg:y2="8.027cm" svg:d="M5500 8000l5173 27" svg:viewBox="0 0 5174 28">
          <text:p/>
        </draw:connector>
        <draw:custom-shape draw:style-name="gr13" draw:text-style-name="P13" draw:layer="layout" svg:width="3.5cm" svg:height="1cm" svg:x="6.1cm" svg:y="7.5cm">
          <text:p text:style-name="P1"><text:span text:style-name="T1">Entrenamient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3.6cm" svg:height="1.1cm" svg:x="11.4cm" svg:y="9.128cm">
          <text:p text:style-name="P6"><text:span text:style-name="T1">Model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14" draw:id="id14" draw:layer="layout" svg:width="3.6cm" svg:height="1.421cm" svg:x="11.4cm" svg:y="5.4cm">
          <text:p text:style-name="P6"><text:span text:style-name="T1">Datos para evalu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0.674cm" svg:y1="8.027cm" svg:x2="11.4cm" svg:y2="6.11cm" draw:end-shape="id14" draw:end-glue-point="6" svg:d="M10674 8027h113v-1917h613" svg:viewBox="0 0 727 1918">
          <text:p/>
        </draw:connector>
        <draw:connector draw:style-name="gr6" draw:text-style-name="P5" draw:layer="layout" svg:x1="10.674cm" svg:y1="8.027cm" svg:x2="11.4cm" svg:y2="9.678cm" draw:end-shape="id13" draw:end-glue-point="6" svg:d="M10674 8027h113v1651h613" svg:viewBox="0 0 727 1652">
          <text:p/>
        </draw:connector>
        <draw:custom-shape draw:style-name="gr16" draw:text-style-name="P15" xml:id="id17" draw:id="id17" draw:layer="layout" svg:width="3.82cm" svg:height="1.254cm" svg:x="15.58cm" svg:y="9.051cm">
          <text:p text:style-name="P1"><text:span text:style-name="T1">Partidas entre</text:span><text:span text:style-name="T1"><text:line-break/></text:span><text:span text:style-name="T1">agen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1" draw:id="id11" draw:layer="layout" svg:width="3.6cm" svg:height="1.296cm" svg:x="20.74cm" svg:y="9.03cm">
          <text:p text:style-name="P6"><text:span text:style-name="T1">Matriz de</text:span><text:span text:style-name="T1"><text:line-break/></text:span><text:span text:style-name="T1">batall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3.5cm" svg:height="0.743cm" svg:x="20.79cm" svg:y="7.61cm">
          <text:p text:style-name="P1"><text:span text:style-name="T1">Bradley-Terr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12" draw:id="id12" draw:layer="layout" svg:width="3.8cm" svg:height="1.104cm" svg:x="20.64cm" svg:y="5.5cm">
          <text:p text:style-name="P16"><text:span text:style-name="T5">Puntu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1.267cm" svg:y1="9.219cm" svg:x2="14.473cm" svg:y2="6.613cm" draw:start-shape="id11" draw:start-glue-point="5" draw:end-shape="id14" draw:end-glue-point="9" svg:d="M21267 9219l-6794-2606" svg:viewBox="0 0 6795 2607">
          <text:p/>
        </draw:connector>
        <draw:connector draw:style-name="gr6" draw:text-style-name="P5" draw:layer="layout" draw:type="line" svg:x1="20.64cm" svg:y1="6.052cm" svg:x2="15cm" svg:y2="6.11cm" draw:start-shape="id12" draw:start-glue-point="6" draw:end-shape="id14" draw:end-glue-point="10" svg:d="M20640 6052l-5640 58" svg:viewBox="0 0 5641 59">
          <text:p/>
        </draw:connector>
        <draw:custom-shape draw:style-name="gr20" draw:text-style-name="P17" xml:id="id15" draw:id="id15" draw:layer="layout" svg:width="3cm" svg:height="1.104cm" svg:x="18.7cm" svg:y="3.6cm">
          <text:p text:style-name="P16"><text:span text:style-name="T5">Modelo predi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2.54cm" svg:y1="5.5cm" svg:x2="21.7cm" svg:y2="4.152cm" draw:start-shape="id12" draw:start-glue-point="4" draw:end-shape="id15" draw:end-glue-point="10" svg:d="M22540 5500v-1348h-840" svg:viewBox="0 0 841 1349">
          <text:p/>
        </draw:connector>
        <draw:connector draw:style-name="gr6" draw:text-style-name="P5" draw:layer="layout" svg:x1="18.7cm" svg:y1="4.152cm" svg:x2="13.2cm" svg:y2="5.4cm" draw:start-shape="id15" draw:start-glue-point="6" draw:end-shape="id14" draw:end-glue-point="4" svg:d="M18700 4152h-5500v1248" svg:viewBox="0 0 5501 1249">
          <text:p/>
        </draw:connector>
        <draw:custom-shape draw:style-name="gr21" draw:text-style-name="P9" xml:id="id16" draw:id="id16" draw:layer="layout" svg:width="2.351cm" svg:height="0.75cm" svg:x="12.1cm" svg:y="10.45cm">
          <text:p text:style-name="P8"><text:span text:style-name="T2">maxDamage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8" draw:id="id18" draw:layer="layout" svg:width="2.351cm" svg:height="0.75cm" svg:x="12.093cm" svg:y="11.362cm">
          <text:p text:style-name="P8"><text:span text:style-name="T2">rando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4.451cm" svg:y1="10.825cm" svg:x2="15.58cm" svg:y2="9.678cm" draw:start-shape="id16" draw:start-glue-point="1" draw:end-shape="id17" draw:end-glue-point="3" svg:d="M14451 10825l1129-1147" svg:viewBox="0 0 1130 1148">
          <text:p/>
        </draw:connector>
        <draw:connector draw:style-name="gr9" draw:text-style-name="P5" draw:layer="layout" draw:type="line" svg:x1="14.444cm" svg:y1="11.737cm" svg:x2="15.58cm" svg:y2="9.678cm" draw:start-shape="id18" draw:start-glue-point="1" draw:end-shape="id17" draw:end-glue-point="3" svg:d="M14444 11737l1136-2059" svg:viewBox="0 0 1137 2060">
          <text:p/>
        </draw:connector>
        <draw:custom-shape draw:style-name="gr22" draw:text-style-name="P17" draw:layer="layout" svg:width="4cm" svg:height="1.104cm" svg:x="14cm" svg:y="3.6cm">
          <text:p text:style-name="P16"><text:span text:style-name="T5">Puntu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1131 1580" svg:d="M1013 1491l118 89-567-1580-564 1580 114-85 136-68 148-46 161-17 161 13 153 46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4:33:43.697983173</meta:creation-date>
    <dc:date>2026-06-21T15:59:00.766482679</dc:date>
    <meta:editing-duration>PT12M36S</meta:editing-duration>
    <meta:editing-cycles>2</meta:editing-cycles>
    <meta:generator>LibreOffice/25.8.7.3$Linux_X86_64 LibreOffice_project/580$Build-3</meta:generator>
    <meta:document-statistic meta:object-count="75"/>
  </office:meta>
</office:document-meta>
</file>