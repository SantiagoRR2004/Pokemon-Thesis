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2a6099" draw:marker-start-width="0.358cm" draw:marker-end-width="0.358cm" draw:fill="solid" draw:fill-color="#eeeeee" draw:textarea-horizontal-align="justify" draw:textarea-vertical-align="middle" draw:auto-grow-height="false" fo:min-height="7.5cm" fo:min-width="16cm" fo:padding-top="0.177cm" fo:padding-bottom="0.177cm" fo:padding-left="0.302cm" fo:padding-right="0.302cm" loext:decorative="false"/>
    </style:style>
    <style:style style:name="gr2" style:family="graphic" style:parent-style-name="standard">
      <style:graphic-properties svg:stroke-color="#000000" draw:fill="solid" draw:fill-color="#ffd428"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Puntas_20_de_20_flecha_20_3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988cm" fo:min-width="1.622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ffaa95"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Puntas_20_de_20_flecha_20_4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428"/>
      <style:paragraph-properties fo:text-align="center" style:writing-mode="lr-tb"/>
    </style:style>
    <style:style style:name="P4" style:family="paragraph">
      <loext:graphic-properties draw:fill="solid" draw:fill-color="#afd095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solid" draw:fill-color="#b4c7dc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solid" draw:fill-color="#ffaa95"/>
      <style:paragraph-properties fo:text-align="center" style:writing-mode="lr-tb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6.5cm" svg:height="7.75cm" svg:x="10.5cm" svg:y="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75cm" svg:height="1.25cm" svg:x="1.75cm" svg:y="7.775cm">
          <text:p text:style-name="P2"><text:span text:style-name="T1">Hiperparámetr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cm" svg:height="1.5cm" svg:x="6.85cm" svg:y="7.65cm">
          <text:p text:style-name="P2"><text:span text:style-name="T1">Redes</text:span><text:span text:style-name="T1"><text:line-break/></text:span><text:span text:style-name="T1">neuronale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.5cm" svg:y1="8.4cm" svg:x2="6.85cm" svg:y2="8.4cm" draw:start-shape="id1" draw:start-glue-point="1" draw:end-shape="id2" draw:end-glue-point="3" svg:d="M5500 8400h1350" svg:viewBox="0 0 1351 1">
          <text:p/>
        </draw:connector>
        <draw:custom-shape draw:style-name="gr5" draw:text-style-name="P7" xml:id="id10" draw:id="id10" draw:layer="layout" svg:width="3cm" svg:height="1.75cm" svg:x="11.5cm" svg:y="7.5cm">
          <text:p text:style-name="P6"><text:span text:style-name="T1">Epo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3cm" svg:height="1.75cm" svg:x="14.95cm" svg:y="4.4cm">
          <text:p text:style-name="P6"><text:span text:style-name="T1">Episodio/</text:span><text:span text:style-name="T1"><text:line-break/></text:span><text:span text:style-name="T1">Bata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4" draw:id="id4" draw:layer="layout" svg:width="2.5cm" svg:height="0.75cm" svg:x="19.7cm" svg:y="4cm">
          <text:p text:style-name="P8"><text:span text:style-name="T2">Random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5" draw:id="id5" draw:layer="layout" svg:width="2.5cm" svg:height="0.75cm" svg:x="19.7cm" svg:y="4.9cm">
          <text:p text:style-name="P8"><text:span text:style-name="T2">MaxDamag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6" draw:id="id6" draw:layer="layout" svg:width="2.5cm" svg:height="0.75cm" svg:x="19.7cm" svg:y="5.8cm">
          <text:p text:style-name="P8"><text:span text:style-name="T2">selfPlay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7.95cm" svg:y1="5.275cm" svg:x2="19.7cm" svg:y2="4.375cm" draw:start-shape="id3" draw:start-glue-point="10" draw:end-shape="id4" draw:end-glue-point="3" svg:d="M17950 5275l1750-900" svg:viewBox="0 0 1751 901">
          <text:p/>
        </draw:connector>
        <draw:connector draw:style-name="gr4" draw:text-style-name="P5" draw:layer="layout" draw:type="line" svg:x1="17.95cm" svg:y1="5.275cm" svg:x2="19.7cm" svg:y2="5.275cm" draw:start-shape="id3" draw:start-glue-point="10" draw:end-shape="id5" draw:end-glue-point="3" svg:d="M17950 5275h1750" svg:viewBox="0 0 1751 1">
          <text:p/>
        </draw:connector>
        <draw:connector draw:style-name="gr4" draw:text-style-name="P5" draw:layer="layout" draw:type="line" svg:x1="17.95cm" svg:y1="5.275cm" svg:x2="19.7cm" svg:y2="6.175cm" draw:start-shape="id3" draw:start-glue-point="10" draw:end-shape="id6" draw:end-glue-point="3" svg:d="M17950 5275l1750 900" svg:viewBox="0 0 1751 901">
          <text:p/>
        </draw:connector>
        <draw:connector draw:style-name="gr4" draw:text-style-name="P5" xml:id="id7" draw:id="id7" draw:layer="layout" draw:type="line" svg:x1="22.2cm" svg:y1="5.275cm" svg:x2="23.616cm" svg:y2="5.238cm" draw:start-shape="id5" draw:start-glue-point="1" svg:d="M22200 5275l1416-37" svg:viewBox="0 0 1417 38">
          <text:p/>
        </draw:connector>
        <draw:connector draw:style-name="gr4" draw:text-style-name="P5" draw:layer="layout" draw:type="line" svg:x1="22.2cm" svg:y1="4.375cm" svg:x2="23.616cm" svg:y2="5.238cm" draw:start-shape="id4" draw:start-glue-point="1" draw:end-shape="id7" draw:end-glue-point="3" svg:d="M22200 4375l1416 863" svg:viewBox="0 0 1417 864">
          <text:p/>
        </draw:connector>
        <draw:connector draw:style-name="gr4" draw:text-style-name="P5" draw:layer="layout" draw:type="line" svg:x1="22.2cm" svg:y1="6.175cm" svg:x2="23.616cm" svg:y2="5.238cm" draw:start-shape="id6" draw:start-glue-point="1" draw:end-shape="id7" draw:end-glue-point="3" svg:d="M22200 6175l1416-937" svg:viewBox="0 0 1417 938">
          <text:p/>
        </draw:connector>
        <draw:connector draw:style-name="gr7" draw:text-style-name="P5" draw:layer="layout" draw:type="line" svg:x1="23.616cm" svg:y1="5.238cm" svg:x2="25.416cm" svg:y2="5.239cm" draw:start-shape="id7" draw:start-glue-point="3" svg:d="M23616 5238l1800 1" svg:viewBox="0 0 1801 2">
          <text:p/>
        </draw:connector>
        <draw:connector draw:style-name="gr7" draw:text-style-name="P5" xml:id="id8" draw:id="id8" draw:layer="layout" draw:type="line" svg:x1="25.439cm" svg:y1="7.419cm" svg:x2="25.416cm" svg:y2="5.24cm" svg:d="M25439 7419l-23-2179" svg:viewBox="0 0 24 2180">
          <text:p/>
        </draw:connector>
        <draw:connector draw:style-name="gr8" draw:text-style-name="P5" draw:layer="layout" draw:line-skew="-0.437cm" svg:x1="25.439cm" svg:y1="7.419cm" svg:x2="16.45cm" svg:y2="6.15cm" draw:start-shape="id8" draw:start-glue-point="2" draw:end-shape="id3" draw:end-glue-point="8" svg:d="M25439 7419v81h-8989v-1350" svg:viewBox="0 0 8990 1351">
          <text:p/>
        </draw:connector>
        <draw:connector draw:style-name="gr7" draw:text-style-name="P5" xml:id="id9" draw:id="id9" draw:layer="layout" draw:type="line" svg:x1="25.439cm" svg:y1="7.419cm" svg:x2="25.439cm" svg:y2="9.332cm" draw:start-shape="id8" draw:start-glue-point="2" svg:d="M25439 7419v1913" svg:viewBox="0 0 1 1914">
          <text:p/>
        </draw:connector>
        <draw:connector draw:style-name="gr8" draw:text-style-name="P5" draw:layer="layout" draw:line-skew="0.15cm" svg:x1="25.439cm" svg:y1="9.332cm" svg:x2="13cm" svg:y2="9.25cm" draw:start-shape="id9" draw:start-glue-point="3" draw:end-shape="id10" draw:end-glue-point="8" svg:d="M25439 9332v668h-12439v-750" svg:viewBox="0 0 12440 751">
          <text:p/>
        </draw:connector>
        <draw:connector draw:style-name="gr8" draw:text-style-name="P5" draw:layer="layout" svg:x1="13cm" svg:y1="7.5cm" svg:x2="14.95cm" svg:y2="5.275cm" draw:start-shape="id10" draw:start-glue-point="4" draw:end-shape="id3" draw:end-glue-point="6" svg:d="M13000 7500v-2225h1950" svg:viewBox="0 0 1951 2226">
          <text:p/>
        </draw:connector>
        <draw:connector draw:style-name="gr4" draw:text-style-name="P5" draw:layer="layout" draw:type="line" svg:x1="9.85cm" svg:y1="8.4cm" svg:x2="11.5cm" svg:y2="8.375cm" draw:start-shape="id2" draw:start-glue-point="1" draw:end-shape="id10" draw:end-glue-point="6" svg:d="M9850 8400l1650-25" svg:viewBox="0 0 1651 26">
          <text:p/>
        </draw:connector>
        <draw:frame draw:style-name="gr9" draw:text-style-name="P10" draw:layer="layout" svg:width="7.5cm" svg:height="0.75cm" svg:x="15.807cm" svg:y="9.408cm">
          <draw:text-box>
            <text:p><text:span text:style-name="T3">calculateRewards / retropropagación</text:span></text:p>
          </draw:text-box>
        </draw:frame>
        <draw:frame draw:style-name="gr9" draw:text-style-name="P12" draw:layer="layout" svg:width="7.5cm" svg:height="0.75cm" svg:x="19.65cm" svg:y="10.3cm">
          <draw:text-box>
            <text:p text:style-name="P11"><text:span text:style-name="T4">Entrenamient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3" draw:display-name="Puntas de flecha 3" svg:viewBox="0 0 1131 1580" svg:d="M1013 1491l118 89-567-1580-564 1580 114-85 136-68 148-46 161-17 161 13 153 46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1T14:04:23.042013010</meta:creation-date>
    <dc:date>2026-06-21T15:57:30.405819983</dc:date>
    <meta:editing-duration>PT1H27M28S</meta:editing-duration>
    <meta:editing-cycles>3</meta:editing-cycles>
    <meta:generator>LibreOffice/25.8.7.3$Linux_X86_64 LibreOffice_project/580$Build-3</meta:generator>
    <meta:document-statistic meta:object-count="24"/>
  </office:meta>
</office:document-meta>
</file>